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72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percentage" office:value="0.06" calcext:value-type="percentage">
            <text:p>6.00%</text:p>
          </table:table-cell>
          <table:table-cell table:style-name="ce2" office:value-type="float" office:value="11.829" calcext:value-type="float">
            <text:p>11.829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1" office:value-type="percentage" office:value="0.08" calcext:value-type="percentage">
            <text:p>8.00%</text:p>
          </table:table-cell>
          <table:table-cell table:style-name="ce2" office:value-type="float" office:value="11.856" calcext:value-type="float">
            <text:p>11.856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1" office:value-type="percentage" office:value="0.15" calcext:value-type="percentage">
            <text:p>15.00%</text:p>
          </table:table-cell>
          <table:table-cell table:style-name="ce2" office:value-type="float" office:value="11.914" calcext:value-type="float">
            <text:p>11.914</text:p>
          </table:table-cell>
          <table:table-cell table:number-columns-repeated="9"/>
        </table:table-row>
        <table:table-row table:style-name="ro1">
          <table:table-cell table:style-name="ce1" office:value-type="percentage" office:value="0.14" calcext:value-type="percentage">
            <text:p>14.00%</text:p>
          </table:table-cell>
          <table:table-cell table:style-name="ce2" office:value-type="float" office:value="11.92" calcext:value-type="float">
            <text:p>11.92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1" office:value-type="percentage" office:value="0.14" calcext:value-type="percentage">
            <text:p>14.00%</text:p>
          </table:table-cell>
          <table:table-cell table:style-name="ce2" office:value-type="float" office:value="11.926" calcext:value-type="float">
            <text:p>11.926</text:p>
          </table:table-cell>
          <table:table-cell table:number-columns-repeated="2"/>
          <table:table-cell table:number-matrix-columns-spanned="2" table:number-matrix-rows-spanned="5" table:formula="of:=LINEST([.$A$1:.$A$28] ; [.$B$1:.$B$28] ; 1 ; 1)" office:value-type="float" office:value="0.724304070569784" calcext:value-type="float">
            <text:p>0.724304070569784</text:p>
          </table:table-cell>
          <table:table-cell office:value-type="float" office:value="-8.46902101886799" calcext:value-type="float">
            <text:p>-8.46902101886799</text:p>
          </table:table-cell>
          <table:table-cell table:number-columns-repeated="5"/>
        </table:table-row>
        <table:table-row table:style-name="ro1">
          <table:table-cell table:style-name="ce1" office:value-type="percentage" office:value="0.14" calcext:value-type="percentage">
            <text:p>14.00%</text:p>
          </table:table-cell>
          <table:table-cell table:style-name="ce2" office:value-type="float" office:value="11.928" calcext:value-type="float">
            <text:p>11.928</text:p>
          </table:table-cell>
          <table:table-cell table:number-columns-repeated="2"/>
          <table:table-cell office:value-type="float" office:value="0.0214951438503268" calcext:value-type="float">
            <text:p>0.0214951438503268</text:p>
          </table:table-cell>
          <table:table-cell office:value-type="float" office:value="0.27556178329021" calcext:value-type="float">
            <text:p>0.27556178329021</text:p>
          </table:table-cell>
          <table:table-cell table:number-columns-repeated="5"/>
        </table:table-row>
        <table:table-row table:style-name="ro1">
          <table:table-cell table:style-name="ce1" office:value-type="percentage" office:value="0.21" calcext:value-type="percentage">
            <text:p>21.00%</text:p>
          </table:table-cell>
          <table:table-cell table:style-name="ce2" office:value-type="float" office:value="12.007" calcext:value-type="float">
            <text:p>12.007</text:p>
          </table:table-cell>
          <table:table-cell table:number-columns-repeated="2"/>
          <table:table-cell office:value-type="float" office:value="0.97761384274217" calcext:value-type="float">
            <text:p>0.97761384274217</text:p>
          </table:table-cell>
          <table:table-cell office:value-type="float" office:value="0.0764912897094011" calcext:value-type="float">
            <text:p>0.0764912897094011</text:p>
          </table:table-cell>
          <table:table-cell table:number-columns-repeated="5"/>
        </table:table-row>
        <table:table-row table:style-name="ro1">
          <table:table-cell table:style-name="ce1" office:value-type="percentage" office:value="0.21" calcext:value-type="percentage">
            <text:p>21.00%</text:p>
          </table:table-cell>
          <table:table-cell table:style-name="ce2" office:value-type="float" office:value="12.018" calcext:value-type="float">
            <text:p>12.018</text:p>
          </table:table-cell>
          <table:table-cell table:number-columns-repeated="2"/>
          <table:table-cell office:value-type="float" office:value="1135.43202696865" calcext:value-type="float">
            <text:p>1135.4320269686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" office:value-type="percentage" office:value="0.24" calcext:value-type="percentage">
            <text:p>24.00%</text:p>
          </table:table-cell>
          <table:table-cell table:style-name="ce2" office:value-type="float" office:value="12.051" calcext:value-type="float">
            <text:p>12.051</text:p>
          </table:table-cell>
          <table:table-cell table:number-columns-repeated="2"/>
          <table:table-cell office:value-type="float" office:value="6.64331900470626" calcext:value-type="float">
            <text:p>6.64331900470626</text:p>
          </table:table-cell>
          <table:table-cell office:value-type="float" office:value="0.152123852436596" calcext:value-type="float">
            <text:p>0.152123852436596</text:p>
          </table:table-cell>
          <table:table-cell table:number-columns-repeated="5"/>
        </table:table-row>
        <table:table-row table:style-name="ro1">
          <table:table-cell table:style-name="ce1" office:value-type="percentage" office:value="0.61" calcext:value-type="percentage">
            <text:p>61.00%</text:p>
          </table:table-cell>
          <table:table-cell table:style-name="ce2" office:value-type="float" office:value="12.509" calcext:value-type="float">
            <text:p>12.509</text:p>
          </table:table-cell>
          <table:table-cell table:number-columns-repeated="9"/>
        </table:table-row>
        <table:table-row table:style-name="ro1">
          <table:table-cell table:style-name="ce1" office:value-type="percentage" office:value="0.62" calcext:value-type="percentage">
            <text:p>62.00%</text:p>
          </table:table-cell>
          <table:table-cell table:style-name="ce2" office:value-type="float" office:value="12.529" calcext:value-type="float">
            <text:p>12.529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style-name="ce1" office:value-type="percentage" office:value="0.74" calcext:value-type="percentage">
            <text:p>74.00%</text:p>
          </table:table-cell>
          <table:table-cell table:style-name="ce2" office:value-type="float" office:value="12.675" calcext:value-type="float">
            <text:p>12.675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formula="of:=[.$E$7]" office:value-type="float" office:value="0.97761384274217" calcext:value-type="float">
            <text:p>0.97761384274217</text:p>
          </table:table-cell>
          <table:table-cell table:number-columns-repeated="5"/>
        </table:table-row>
        <table:table-row table:style-name="ro1">
          <table:table-cell table:style-name="ce1" office:value-type="percentage" office:value="0.84" calcext:value-type="percentage">
            <text:p>84.00%</text:p>
          </table:table-cell>
          <table:table-cell table:style-name="ce2" office:value-type="float" office:value="12.795" calcext:value-type="float">
            <text:p>12.795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F$7]" office:value-type="float" office:value="0.0764912897094011" calcext:value-type="float">
            <text:p>0.0764912897094011</text:p>
          </table:table-cell>
          <table:table-cell table:number-columns-repeated="5"/>
        </table:table-row>
        <table:table-row table:style-name="ro1">
          <table:table-cell table:style-name="ce1" office:value-type="percentage" office:value="0.85" calcext:value-type="percentage">
            <text:p>85.00%</text:p>
          </table:table-cell>
          <table:table-cell table:style-name="ce2" office:value-type="float" office:value="12.818" calcext:value-type="float">
            <text:p>12.818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percentage" office:value="0.99" calcext:value-type="percentage">
            <text:p>99.00%</text:p>
          </table:table-cell>
          <table:table-cell table:style-name="ce2" office:value-type="float" office:value="12.982" calcext:value-type="float">
            <text:p>12.982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28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" office:value-type="percentage" office:value="1.11" calcext:value-type="percentage">
            <text:p>111.00%</text:p>
          </table:table-cell>
          <table:table-cell table:style-name="ce2" office:value-type="float" office:value="13.141" calcext:value-type="float">
            <text:p>13.141</text:p>
          </table:table-cell>
          <table:table-cell table:number-columns-repeated="2"/>
          <table:table-cell office:value-type="string" calcext:value-type="string">
            <text:p>Adjusted R^2</text:p>
          </table:table-cell>
          <table:table-cell table:formula="of:=1 - (1 - [.$E$7])*([.$F$15] - 1)/([.$F$15] - [.$F$14] - 1)" office:value-type="float" office:value="0.976752836693792" calcext:value-type="float">
            <text:p>0.976752836693792</text:p>
          </table:table-cell>
          <table:table-cell table:number-columns-repeated="5"/>
        </table:table-row>
        <table:table-row table:style-name="ro1">
          <table:table-cell table:style-name="ce1" office:value-type="percentage" office:value="1.22" calcext:value-type="percentage">
            <text:p>122.00%</text:p>
          </table:table-cell>
          <table:table-cell table:style-name="ce2" office:value-type="float" office:value="13.269" calcext:value-type="float">
            <text:p>13.269</text:p>
          </table:table-cell>
          <table:table-cell table:number-columns-repeated="9"/>
        </table:table-row>
        <table:table-row table:style-name="ro1">
          <table:table-cell table:style-name="ce1" office:value-type="percentage" office:value="1.25" calcext:value-type="percentage">
            <text:p>125.00%</text:p>
          </table:table-cell>
          <table:table-cell table:style-name="ce2" office:value-type="float" office:value="13.308" calcext:value-type="float">
            <text:p>13.308</text:p>
          </table:table-cell>
          <table:table-cell table:number-columns-repeated="2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style-name="ce1" office:value-type="percentage" office:value="1.26" calcext:value-type="percentage">
            <text:p>126.00%</text:p>
          </table:table-cell>
          <table:table-cell table:style-name="ce2" office:value-type="float" office:value="13.331" calcext:value-type="float">
            <text:p>13.331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style-name="ce1" office:value-type="percentage" office:value="1.27" calcext:value-type="percentage">
            <text:p>127.00%</text:p>
          </table:table-cell>
          <table:table-cell table:style-name="ce2" office:value-type="float" office:value="13.334" calcext:value-type="float">
            <text:p>13.334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F$14]" office:value-type="float" office:value="1" calcext:value-type="float">
            <text:p>1</text:p>
          </table:table-cell>
          <table:table-cell table:formula="of:=[.$E$9]" office:value-type="float" office:value="6.64331900470626" calcext:value-type="float">
            <text:p>6.64331900470626</text:p>
          </table:table-cell>
          <table:table-cell table:formula="of:=[.$E$9] / [.$F$20]" office:value-type="float" office:value="6.64331900470626" calcext:value-type="float">
            <text:p>6.64331900470626</text:p>
          </table:table-cell>
          <table:table-cell table:formula="of:=[.$E$8]" office:value-type="float" office:value="1135.43202696865" calcext:value-type="float">
            <text:p>1135.43202696865</text:p>
          </table:table-cell>
          <table:table-cell table:formula="of:=LEGACY.FDIST([.$E$8] ; [.$F$20] ; [.$F$8])" office:value-type="float" office:value="5.5535985489147E-023" calcext:value-type="float">
            <text:p>5.5535985489147E-23</text:p>
          </table:table-cell>
          <table:table-cell/>
        </table:table-row>
        <table:table-row table:style-name="ro1">
          <table:table-cell table:style-name="ce1" office:value-type="percentage" office:value="1.27" calcext:value-type="percentage">
            <text:p>127.00%</text:p>
          </table:table-cell>
          <table:table-cell table:style-name="ce2" office:value-type="float" office:value="13.338" calcext:value-type="float">
            <text:p>13.338</text:p>
          </table:table-cell>
          <table:table-cell table:number-columns-repeated="2"/>
          <table:table-cell office:value-type="string" calcext:value-type="string">
            <text:p>Residual</text:p>
          </table:table-cell>
          <table:table-cell table:formula="of:=[.$F$8]" office:value-type="float" office:value="26" calcext:value-type="float">
            <text:p>26</text:p>
          </table:table-cell>
          <table:table-cell table:formula="of:=[.$F$9]" office:value-type="float" office:value="0.152123852436596" calcext:value-type="float">
            <text:p>0.152123852436596</text:p>
          </table:table-cell>
          <table:table-cell table:formula="of:=[.$F$9] / [.$F$8]" office:value-type="float" office:value="0.00585091740140752" calcext:value-type="float">
            <text:p>0.00585091740140752</text:p>
          </table:table-cell>
          <table:table-cell table:number-columns-repeated="3"/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375" calcext:value-type="float">
            <text:p>13.37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[.$F$20] + [.$F$8]" office:value-type="float" office:value="27" calcext:value-type="float">
            <text:p>27</text:p>
          </table:table-cell>
          <table:table-cell table:formula="of:=[.$E$9] + [.$F$9]" office:value-type="float" office:value="6.79544285714286" calcext:value-type="float">
            <text:p>6.79544285714286</text:p>
          </table:table-cell>
          <table:table-cell table:number-columns-repeated="4"/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404" calcext:value-type="float">
            <text:p>13.404</text:p>
          </table:table-cell>
          <table:table-cell table:number-columns-repeated="9"/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48" calcext:value-type="float">
            <text:p>13.48</text:p>
          </table:table-cell>
          <table:table-cell table:number-columns-repeated="2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555" calcext:value-type="float">
            <text:p>13.555</text:p>
          </table:table-cell>
          <table:table-cell table:number-columns-repeated="9"/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656" calcext:value-type="float">
            <text:p>13.656</text:p>
          </table:table-cell>
          <table:table-cell table:number-columns-repeated="3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727" calcext:value-type="float">
            <text:p>13.727</text:p>
          </table:table-cell>
          <table:table-cell table:number-columns-repeated="2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5:.$F$5]; 1 ; ROW([.$F$28])+1 - ROW())" office:value-type="float" office:value="-8.46902101886799" calcext:value-type="float">
            <text:p>-8.46902101886799</text:p>
          </table:table-cell>
          <table:table-cell table:number-matrix-columns-spanned="1" table:number-matrix-rows-spanned="2" table:formula="of:=INDEX([.$E$6:.$F$6]; 1 ; ROW([.$G$28])+1 - ROW())" office:value-type="float" office:value="0.27556178329021" calcext:value-type="float">
            <text:p>0.27556178329021</text:p>
          </table:table-cell>
          <table:table-cell table:number-matrix-columns-spanned="1" table:number-matrix-rows-spanned="2" table:formula="of:=[.$F$27:.$F$28] / [.$G$27:.$G$28]" office:value-type="float" office:value="-30.7336558711002" calcext:value-type="float">
            <text:p>-30.7336558711002</text:p>
          </table:table-cell>
          <table:table-cell table:number-matrix-columns-spanned="1" table:number-matrix-rows-spanned="2" table:formula="of:=LEGACY.TDIST(ABS([.$H$27:.$H$28]) ; [.$F$8] ; 2 )" office:value-type="float" office:value="5.74282221381174E-022" calcext:value-type="float">
            <text:p>5.74282221381174E-22</text:p>
          </table:table-cell>
          <table:table-cell table:number-matrix-columns-spanned="1" table:number-matrix-rows-spanned="2" table:formula="of:=[.$F$27:.$F$28] - [.$G$27:.$G$28] * TINV(1 - [.$F$24] ; [.$F$8])" office:value-type="float" office:value="-9.03544637658595" calcext:value-type="float">
            <text:p>-9.03544637658595</text:p>
          </table:table-cell>
          <table:table-cell table:number-matrix-columns-spanned="1" table:number-matrix-rows-spanned="2" table:formula="of:=[.$F$27:.$F$28] + [.$G$27:.$G$28] * TINV(1 - [.$F$24] ; [.$F$8])" office:value-type="float" office:value="-7.90259566115004" calcext:value-type="float">
            <text:p>-7.90259566115004</text:p>
          </table:table-cell>
        </table:table-row>
        <table:table-row table:style-name="ro1">
          <table:table-cell table:style-name="ce1" office:value-type="percentage" office:value="1.3" calcext:value-type="percentage">
            <text:p>130.00%</text:p>
          </table:table-cell>
          <table:table-cell table:style-name="ce2" office:value-type="float" office:value="13.783" calcext:value-type="float">
            <text:p>13.783</text:p>
          </table:table-cell>
          <table:table-cell table:number-columns-repeated="2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724304070569784" calcext:value-type="float">
            <text:p>0.724304070569784</text:p>
          </table:table-cell>
          <table:table-cell office:value-type="float" office:value="0.0214951438503268" calcext:value-type="float">
            <text:p>0.0214951438503268</text:p>
          </table:table-cell>
          <table:table-cell office:value-type="float" office:value="33.6961722895739" calcext:value-type="float">
            <text:p>33.6961722895739</text:p>
          </table:table-cell>
          <table:table-cell office:value-type="float" office:value="5.5535985489147E-023" calcext:value-type="float">
            <text:p>5.5535985489147E-23</text:p>
          </table:table-cell>
          <table:table-cell office:value-type="float" office:value="0.680120169597574" calcext:value-type="float">
            <text:p>0.680120169597574</text:p>
          </table:table-cell>
          <table:table-cell office:value-type="float" office:value="0.768487971541994" calcext:value-type="float">
            <text:p>0.7684879715419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matrix-columns-spanned="1" table:number-matrix-rows-spanned="28" table:formula="of:=[.$B$1:.$B$28]" office:value-type="float" office:value="11.829" calcext:value-type="float">
            <text:p>11.829</text:p>
          </table:table-cell>
          <table:table-cell table:number-matrix-columns-spanned="1" table:number-matrix-rows-spanned="28" table:formula="of:=MMULT([.$E$31:.$E$58] ; [.$F$28]) + [.$F$27]" office:value-type="float" office:value="0.0987718319019884" calcext:value-type="float">
            <text:p>0.0987718319019884</text:p>
          </table:table-cell>
          <table:table-cell table:number-matrix-columns-spanned="1" table:number-matrix-rows-spanned="28" table:formula="of:=[.$A$1:.$A$28]" office:value-type="float" office:value="0.06" calcext:value-type="float">
            <text:p>0.06</text:p>
          </table:table-cell>
          <table:table-cell table:number-matrix-columns-spanned="1" table:number-matrix-rows-spanned="28" table:formula="of:=[.$G$31:.$G$58] - [.$F$31:.$F$58]" office:value-type="float" office:value="-0.0387718319019884" calcext:value-type="float">
            <text:p>-0.0387718319019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856" calcext:value-type="float">
            <text:p>11.856</text:p>
          </table:table-cell>
          <table:table-cell office:value-type="float" office:value="0.118328041807372" calcext:value-type="float">
            <text:p>0.118328041807372</text:p>
          </table:table-cell>
          <table:table-cell office:value-type="float" office:value="0.08" calcext:value-type="float">
            <text:p>0.08</text:p>
          </table:table-cell>
          <table:table-cell office:value-type="float" office:value="-0.0383280418073718" calcext:value-type="float">
            <text:p>-0.03832804180737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914" calcext:value-type="float">
            <text:p>11.914</text:p>
          </table:table-cell>
          <table:table-cell office:value-type="float" office:value="0.160337677900419" calcext:value-type="float">
            <text:p>0.160337677900419</text:p>
          </table:table-cell>
          <table:table-cell office:value-type="float" office:value="0.15" calcext:value-type="float">
            <text:p>0.15</text:p>
          </table:table-cell>
          <table:table-cell office:value-type="float" office:value="-0.0103376779004186" calcext:value-type="float">
            <text:p>-0.0103376779004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92" calcext:value-type="float">
            <text:p>11.92</text:p>
          </table:table-cell>
          <table:table-cell office:value-type="float" office:value="0.164683502323838" calcext:value-type="float">
            <text:p>0.164683502323838</text:p>
          </table:table-cell>
          <table:table-cell office:value-type="float" office:value="0.14" calcext:value-type="float">
            <text:p>0.14</text:p>
          </table:table-cell>
          <table:table-cell office:value-type="float" office:value="-0.0246835023238378" calcext:value-type="float">
            <text:p>-0.0246835023238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926" calcext:value-type="float">
            <text:p>11.926</text:p>
          </table:table-cell>
          <table:table-cell office:value-type="float" office:value="0.169029326747257" calcext:value-type="float">
            <text:p>0.169029326747257</text:p>
          </table:table-cell>
          <table:table-cell office:value-type="float" office:value="0.14" calcext:value-type="float">
            <text:p>0.14</text:p>
          </table:table-cell>
          <table:table-cell office:value-type="float" office:value="-0.0290293267472569" calcext:value-type="float">
            <text:p>-0.02902932674725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928" calcext:value-type="float">
            <text:p>11.928</text:p>
          </table:table-cell>
          <table:table-cell office:value-type="float" office:value="0.170477934888396" calcext:value-type="float">
            <text:p>0.170477934888396</text:p>
          </table:table-cell>
          <table:table-cell office:value-type="float" office:value="0.14" calcext:value-type="float">
            <text:p>0.14</text:p>
          </table:table-cell>
          <table:table-cell office:value-type="float" office:value="-0.030477934888396" calcext:value-type="float">
            <text:p>-0.0304779348883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007" calcext:value-type="float">
            <text:p>12.007</text:p>
          </table:table-cell>
          <table:table-cell office:value-type="float" office:value="0.227697956463409" calcext:value-type="float">
            <text:p>0.227697956463409</text:p>
          </table:table-cell>
          <table:table-cell office:value-type="float" office:value="0.21" calcext:value-type="float">
            <text:p>0.21</text:p>
          </table:table-cell>
          <table:table-cell office:value-type="float" office:value="-0.017697956463409" calcext:value-type="float">
            <text:p>-0.0176979564634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018" calcext:value-type="float">
            <text:p>12.018</text:p>
          </table:table-cell>
          <table:table-cell office:value-type="float" office:value="0.235665301239678" calcext:value-type="float">
            <text:p>0.235665301239678</text:p>
          </table:table-cell>
          <table:table-cell office:value-type="float" office:value="0.21" calcext:value-type="float">
            <text:p>0.21</text:p>
          </table:table-cell>
          <table:table-cell office:value-type="float" office:value="-0.0256653012396777" calcext:value-type="float">
            <text:p>-0.02566530123967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051" calcext:value-type="float">
            <text:p>12.051</text:p>
          </table:table-cell>
          <table:table-cell office:value-type="float" office:value="0.25956733556848" calcext:value-type="float">
            <text:p>0.25956733556848</text:p>
          </table:table-cell>
          <table:table-cell office:value-type="float" office:value="0.24" calcext:value-type="float">
            <text:p>0.24</text:p>
          </table:table-cell>
          <table:table-cell office:value-type="float" office:value="-0.0195673355684802" calcext:value-type="float">
            <text:p>-0.01956733556848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509" calcext:value-type="float">
            <text:p>12.509</text:p>
          </table:table-cell>
          <table:table-cell office:value-type="float" office:value="0.591298599889441" calcext:value-type="float">
            <text:p>0.591298599889441</text:p>
          </table:table-cell>
          <table:table-cell office:value-type="float" office:value="0.61" calcext:value-type="float">
            <text:p>0.61</text:p>
          </table:table-cell>
          <table:table-cell office:value-type="float" office:value="0.0187014001105587" calcext:value-type="float">
            <text:p>0.0187014001105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529" calcext:value-type="float">
            <text:p>12.529</text:p>
          </table:table-cell>
          <table:table-cell office:value-type="float" office:value="0.605784681300836" calcext:value-type="float">
            <text:p>0.605784681300836</text:p>
          </table:table-cell>
          <table:table-cell office:value-type="float" office:value="0.62" calcext:value-type="float">
            <text:p>0.62</text:p>
          </table:table-cell>
          <table:table-cell office:value-type="float" office:value="0.0142153186991639" calcext:value-type="float">
            <text:p>0.01421531869916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675" calcext:value-type="float">
            <text:p>12.675</text:p>
          </table:table-cell>
          <table:table-cell office:value-type="float" office:value="0.711533075604026" calcext:value-type="float">
            <text:p>0.711533075604026</text:p>
          </table:table-cell>
          <table:table-cell office:value-type="float" office:value="0.74" calcext:value-type="float">
            <text:p>0.74</text:p>
          </table:table-cell>
          <table:table-cell office:value-type="float" office:value="0.0284669243959745" calcext:value-type="float">
            <text:p>0.02846692439597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795" calcext:value-type="float">
            <text:p>12.795</text:p>
          </table:table-cell>
          <table:table-cell office:value-type="float" office:value="0.798449564072399" calcext:value-type="float">
            <text:p>0.798449564072399</text:p>
          </table:table-cell>
          <table:table-cell office:value-type="float" office:value="0.84" calcext:value-type="float">
            <text:p>0.84</text:p>
          </table:table-cell>
          <table:table-cell office:value-type="float" office:value="0.0415504359276008" calcext:value-type="float">
            <text:p>0.04155043592760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818" calcext:value-type="float">
            <text:p>12.818</text:p>
          </table:table-cell>
          <table:table-cell office:value-type="float" office:value="0.815108557695504" calcext:value-type="float">
            <text:p>0.815108557695504</text:p>
          </table:table-cell>
          <table:table-cell office:value-type="float" office:value="0.85" calcext:value-type="float">
            <text:p>0.85</text:p>
          </table:table-cell>
          <table:table-cell office:value-type="float" office:value="0.0348914423044956" calcext:value-type="float">
            <text:p>0.03489144230449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.982" calcext:value-type="float">
            <text:p>12.982</text:p>
          </table:table-cell>
          <table:table-cell office:value-type="float" office:value="0.933894425268948" calcext:value-type="float">
            <text:p>0.933894425268948</text:p>
          </table:table-cell>
          <table:table-cell office:value-type="float" office:value="0.99" calcext:value-type="float">
            <text:p>0.99</text:p>
          </table:table-cell>
          <table:table-cell office:value-type="float" office:value="0.0561055747310524" calcext:value-type="float">
            <text:p>0.05610557473105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141" calcext:value-type="float">
            <text:p>13.141</text:p>
          </table:table-cell>
          <table:table-cell office:value-type="float" office:value="1.04905877248954" calcext:value-type="float">
            <text:p>1.04905877248954</text:p>
          </table:table-cell>
          <table:table-cell office:value-type="float" office:value="1.11" calcext:value-type="float">
            <text:p>1.11</text:p>
          </table:table-cell>
          <table:table-cell office:value-type="float" office:value="0.0609412275104553" calcext:value-type="float">
            <text:p>0.06094122751045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269" calcext:value-type="float">
            <text:p>13.269</text:p>
          </table:table-cell>
          <table:table-cell office:value-type="float" office:value="1.14176969352248" calcext:value-type="float">
            <text:p>1.14176969352248</text:p>
          </table:table-cell>
          <table:table-cell office:value-type="float" office:value="1.22" calcext:value-type="float">
            <text:p>1.22</text:p>
          </table:table-cell>
          <table:table-cell office:value-type="float" office:value="0.0782303064775232" calcext:value-type="float">
            <text:p>0.07823030647752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308" calcext:value-type="float">
            <text:p>13.308</text:p>
          </table:table-cell>
          <table:table-cell office:value-type="float" office:value="1.1700175522747" calcext:value-type="float">
            <text:p>1.1700175522747</text:p>
          </table:table-cell>
          <table:table-cell office:value-type="float" office:value="1.25" calcext:value-type="float">
            <text:p>1.25</text:p>
          </table:table-cell>
          <table:table-cell office:value-type="float" office:value="0.0799824477253015" calcext:value-type="float">
            <text:p>0.07998244772530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331" calcext:value-type="float">
            <text:p>13.331</text:p>
          </table:table-cell>
          <table:table-cell office:value-type="float" office:value="1.1866765458978" calcext:value-type="float">
            <text:p>1.1866765458978</text:p>
          </table:table-cell>
          <table:table-cell office:value-type="float" office:value="1.26" calcext:value-type="float">
            <text:p>1.26</text:p>
          </table:table-cell>
          <table:table-cell office:value-type="float" office:value="0.0733234541021963" calcext:value-type="float">
            <text:p>0.07332345410219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334" calcext:value-type="float">
            <text:p>13.334</text:p>
          </table:table-cell>
          <table:table-cell office:value-type="float" office:value="1.18884945810951" calcext:value-type="float">
            <text:p>1.18884945810951</text:p>
          </table:table-cell>
          <table:table-cell office:value-type="float" office:value="1.27" calcext:value-type="float">
            <text:p>1.27</text:p>
          </table:table-cell>
          <table:table-cell office:value-type="float" office:value="0.0811505418904877" calcext:value-type="float">
            <text:p>0.08115054189048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338" calcext:value-type="float">
            <text:p>13.338</text:p>
          </table:table-cell>
          <table:table-cell office:value-type="float" office:value="1.19174667439179" calcext:value-type="float">
            <text:p>1.19174667439179</text:p>
          </table:table-cell>
          <table:table-cell office:value-type="float" office:value="1.27" calcext:value-type="float">
            <text:p>1.27</text:p>
          </table:table-cell>
          <table:table-cell office:value-type="float" office:value="0.0782533256082094" calcext:value-type="float">
            <text:p>0.07825332560820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375" calcext:value-type="float">
            <text:p>13.375</text:p>
          </table:table-cell>
          <table:table-cell office:value-type="float" office:value="1.21854592500287" calcext:value-type="float">
            <text:p>1.21854592500287</text:p>
          </table:table-cell>
          <table:table-cell office:value-type="float" office:value="1.3" calcext:value-type="float">
            <text:p>1.3</text:p>
          </table:table-cell>
          <table:table-cell office:value-type="float" office:value="0.0814540749971269" calcext:value-type="float">
            <text:p>0.08145407499712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404" calcext:value-type="float">
            <text:p>13.404</text:p>
          </table:table-cell>
          <table:table-cell office:value-type="float" office:value="1.2395507430494" calcext:value-type="float">
            <text:p>1.2395507430494</text:p>
          </table:table-cell>
          <table:table-cell office:value-type="float" office:value="1.3" calcext:value-type="float">
            <text:p>1.3</text:p>
          </table:table-cell>
          <table:table-cell office:value-type="float" office:value="0.0604492569506026" calcext:value-type="float">
            <text:p>0.06044925695060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48" calcext:value-type="float">
            <text:p>13.48</text:p>
          </table:table-cell>
          <table:table-cell office:value-type="float" office:value="1.2945978524127" calcext:value-type="float">
            <text:p>1.2945978524127</text:p>
          </table:table-cell>
          <table:table-cell office:value-type="float" office:value="1.3" calcext:value-type="float">
            <text:p>1.3</text:p>
          </table:table-cell>
          <table:table-cell office:value-type="float" office:value="0.00540214758729829" calcext:value-type="float">
            <text:p>0.00540214758729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555" calcext:value-type="float">
            <text:p>13.555</text:p>
          </table:table-cell>
          <table:table-cell office:value-type="float" office:value="1.34892065770543" calcext:value-type="float">
            <text:p>1.34892065770543</text:p>
          </table:table-cell>
          <table:table-cell office:value-type="float" office:value="1.3" calcext:value-type="float">
            <text:p>1.3</text:p>
          </table:table-cell>
          <table:table-cell office:value-type="float" office:value="-0.0489206577054346" calcext:value-type="float">
            <text:p>-0.04892065770543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656" calcext:value-type="float">
            <text:p>13.656</text:p>
          </table:table-cell>
          <table:table-cell office:value-type="float" office:value="1.42207536883298" calcext:value-type="float">
            <text:p>1.42207536883298</text:p>
          </table:table-cell>
          <table:table-cell office:value-type="float" office:value="1.3" calcext:value-type="float">
            <text:p>1.3</text:p>
          </table:table-cell>
          <table:table-cell office:value-type="float" office:value="-0.122075368832983" calcext:value-type="float">
            <text:p>-0.1220753688329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727" calcext:value-type="float">
            <text:p>13.727</text:p>
          </table:table-cell>
          <table:table-cell office:value-type="float" office:value="1.47350095784344" calcext:value-type="float">
            <text:p>1.47350095784344</text:p>
          </table:table-cell>
          <table:table-cell office:value-type="float" office:value="1.3" calcext:value-type="float">
            <text:p>1.3</text:p>
          </table:table-cell>
          <table:table-cell office:value-type="float" office:value="-0.173500957843438" calcext:value-type="float">
            <text:p>-0.1735009578434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.783" calcext:value-type="float">
            <text:p>13.783</text:p>
          </table:table-cell>
          <table:table-cell office:value-type="float" office:value="1.51406198579535" calcext:value-type="float">
            <text:p>1.51406198579535</text:p>
          </table:table-cell>
          <table:table-cell office:value-type="float" office:value="1.3" calcext:value-type="float">
            <text:p>1.3</text:p>
          </table:table-cell>
          <table:table-cell office:value-type="float" office:value="-0.214061985795346" calcext:value-type="float">
            <text:p>-0.214061985795346</text:p>
          </table:table-cell>
          <table:table-cell table:number-columns-repeated="3"/>
        </table:table-row>
      </table:table>
      <table:table table:name="Sheet1_2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11.829" calcext:value-type="float">
            <text:p>11.829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percentage" office:value="0.08" calcext:value-type="percentage">
            <text:p>8.00%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11.914" calcext:value-type="float">
            <text:p>11.914</text:p>
          </table:table-cell>
          <table:table-cell office:value-type="percentage" office:value="0.15" calcext:value-type="percentage">
            <text:p>15.00%</text:p>
          </table:table-cell>
          <table:table-cell table:number-columns-repeated="9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percentage" office:value="0.14" calcext:value-type="percentage">
            <text:p>14.00%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11.926" calcext:value-type="float">
            <text:p>11.926</text:p>
          </table:table-cell>
          <table:table-cell office:value-type="percentage" office:value="0.14" calcext:value-type="percentage">
            <text:p>14.00%</text:p>
          </table:table-cell>
          <table:table-cell table:number-columns-repeated="2"/>
          <table:table-cell table:number-matrix-columns-spanned="2" table:number-matrix-rows-spanned="5" table:formula="of:=LINEST([.$B$1:.$B$21] ; [.$A$1:.$A$21] ; 1 ; 1)" office:value-type="float" office:value="0.799697673279412" calcext:value-type="float">
            <text:p>0.799697673279412</text:p>
          </table:table-cell>
          <table:table-cell office:value-type="float" office:value="-9.39536874096728" calcext:value-type="float">
            <text:p>-9.39536874096728</text:p>
          </table:table-cell>
          <table:table-cell table:number-columns-repeated="5"/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percentage" office:value="0.14" calcext:value-type="percentage">
            <text:p>14.00%</text:p>
          </table:table-cell>
          <table:table-cell table:number-columns-repeated="2"/>
          <table:table-cell office:value-type="float" office:value="0.00208543956639815" calcext:value-type="float">
            <text:p>0.00208543956639815</text:p>
          </table:table-cell>
          <table:table-cell office:value-type="float" office:value="0.0261929165443479" calcext:value-type="float">
            <text:p>0.0261929165443479</text:p>
          </table:table-cell>
          <table:table-cell table:number-columns-repeated="5"/>
        </table:table-row>
        <table:table-row table:style-name="ro1">
          <table:table-cell office:value-type="float" office:value="12.007" calcext:value-type="float">
            <text:p>12.007</text:p>
          </table:table-cell>
          <table:table-cell office:value-type="percentage" office:value="0.21" calcext:value-type="percentage">
            <text:p>21.00%</text:p>
          </table:table-cell>
          <table:table-cell table:number-columns-repeated="2"/>
          <table:table-cell office:value-type="float" office:value="0.999870806387409" calcext:value-type="float">
            <text:p>0.999870806387409</text:p>
          </table:table-cell>
          <table:table-cell office:value-type="float" office:value="0.00552871510112062" calcext:value-type="float">
            <text:p>0.00552871510112062</text:p>
          </table:table-cell>
          <table:table-cell table:number-columns-repeated="5"/>
        </table:table-row>
        <table:table-row table:style-name="ro1">
          <table:table-cell office:value-type="float" office:value="12.018" calcext:value-type="float">
            <text:p>12.018</text:p>
          </table:table-cell>
          <table:table-cell office:value-type="percentage" office:value="0.21" calcext:value-type="percentage">
            <text:p>21.00%</text:p>
          </table:table-cell>
          <table:table-cell table:number-columns-repeated="2"/>
          <table:table-cell office:value-type="float" office:value="147047.094205286" calcext:value-type="float">
            <text:p>147047.09420528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2.051" calcext:value-type="float">
            <text:p>12.051</text:p>
          </table:table-cell>
          <table:table-cell office:value-type="percentage" office:value="0.24" calcext:value-type="percentage">
            <text:p>24.00%</text:p>
          </table:table-cell>
          <table:table-cell table:number-columns-repeated="2"/>
          <table:table-cell office:value-type="float" office:value="4.49474304240109" calcext:value-type="float">
            <text:p>4.49474304240109</text:p>
          </table:table-cell>
          <table:table-cell office:value-type="float" office:value="0.000580767122717825" calcext:value-type="float">
            <text:p>0.000580767122717825</text:p>
          </table:table-cell>
          <table:table-cell table:number-columns-repeated="5"/>
        </table:table-row>
        <table:table-row table:style-name="ro1">
          <table:table-cell office:value-type="float" office:value="12.509" calcext:value-type="float">
            <text:p>12.509</text:p>
          </table:table-cell>
          <table:table-cell office:value-type="percentage" office:value="0.61" calcext:value-type="percentage">
            <text:p>61.00%</text:p>
          </table:table-cell>
          <table:table-cell table:number-columns-repeated="9"/>
        </table:table-row>
        <table:table-row table:style-name="ro1">
          <table:table-cell office:value-type="float" office:value="12.529" calcext:value-type="float">
            <text:p>12.529</text:p>
          </table:table-cell>
          <table:table-cell office:value-type="percentage" office:value="0.62" calcext:value-type="percentage">
            <text:p>62.00%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2.675" calcext:value-type="float">
            <text:p>12.675</text:p>
          </table:table-cell>
          <table:table-cell office:value-type="percentage" office:value="0.74" calcext:value-type="percentage">
            <text:p>74.00%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formula="of:=[.$E$7]" office:value-type="float" office:value="0.999870806387409" calcext:value-type="float">
            <text:p>0.999870806387409</text:p>
          </table:table-cell>
          <table:table-cell table:number-columns-repeated="5"/>
        </table:table-row>
        <table:table-row table:style-name="ro1">
          <table:table-cell office:value-type="float" office:value="12.795" calcext:value-type="float">
            <text:p>12.795</text:p>
          </table:table-cell>
          <table:table-cell office:value-type="percentage" office:value="0.84" calcext:value-type="percentage">
            <text:p>84.00%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F$7]" office:value-type="float" office:value="0.00552871510112062" calcext:value-type="float">
            <text:p>0.00552871510112062</text:p>
          </table:table-cell>
          <table:table-cell table:number-columns-repeated="5"/>
        </table:table-row>
        <table:table-row table:style-name="ro1">
          <table:table-cell office:value-type="float" office:value="12.818" calcext:value-type="float">
            <text:p>12.818</text:p>
          </table:table-cell>
          <table:table-cell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.982" calcext:value-type="float">
            <text:p>12.982</text:p>
          </table:table-cell>
          <table:table-cell office:value-type="percentage" office:value="0.99" calcext:value-type="percentage">
            <text:p>99.00%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2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3.141" calcext:value-type="float">
            <text:p>13.141</text:p>
          </table:table-cell>
          <table:table-cell office:value-type="percentage" office:value="1.11" calcext:value-type="percentage">
            <text:p>111.00%</text:p>
          </table:table-cell>
          <table:table-cell table:number-columns-repeated="2"/>
          <table:table-cell office:value-type="string" calcext:value-type="string">
            <text:p>Adjusted R^2</text:p>
          </table:table-cell>
          <table:table-cell table:formula="of:=1 - (1 - [.$E$7])*([.$F$15] - 1)/([.$F$15] - [.$F$14] - 1)" office:value-type="float" office:value="0.999864006723589" calcext:value-type="float">
            <text:p>0.999864006723589</text:p>
          </table:table-cell>
          <table:table-cell table:number-columns-repeated="5"/>
        </table:table-row>
        <table:table-row table:style-name="ro1">
          <table:table-cell office:value-type="float" office:value="13.269" calcext:value-type="float">
            <text:p>13.269</text:p>
          </table:table-cell>
          <table:table-cell office:value-type="percentage" office:value="1.22" calcext:value-type="percentage">
            <text:p>122.00%</text:p>
          </table:table-cell>
          <table:table-cell table:number-columns-repeated="9"/>
        </table:table-row>
        <table:table-row table:style-name="ro1">
          <table:table-cell office:value-type="float" office:value="13.308" calcext:value-type="float">
            <text:p>13.308</text:p>
          </table:table-cell>
          <table:table-cell office:value-type="percentage" office:value="1.25" calcext:value-type="percentage">
            <text:p>125.00%</text:p>
          </table:table-cell>
          <table:table-cell table:number-columns-repeated="2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13.331" calcext:value-type="float">
            <text:p>13.331</text:p>
          </table:table-cell>
          <table:table-cell office:value-type="percentage" office:value="1.26" calcext:value-type="percentage">
            <text:p>126.00%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13.334" calcext:value-type="float">
            <text:p>13.334</text:p>
          </table:table-cell>
          <table:table-cell office:value-type="percentage" office:value="1.27" calcext:value-type="percentage">
            <text:p>127.00%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F$14]" office:value-type="float" office:value="1" calcext:value-type="float">
            <text:p>1</text:p>
          </table:table-cell>
          <table:table-cell table:formula="of:=[.$E$9]" office:value-type="float" office:value="4.49474304240109" calcext:value-type="float">
            <text:p>4.49474304240109</text:p>
          </table:table-cell>
          <table:table-cell table:formula="of:=[.$E$9] / [.$F$20]" office:value-type="float" office:value="4.49474304240109" calcext:value-type="float">
            <text:p>4.49474304240109</text:p>
          </table:table-cell>
          <table:table-cell table:formula="of:=[.$E$8]" office:value-type="float" office:value="147047.094205286" calcext:value-type="float">
            <text:p>147047.094205286</text:p>
          </table:table-cell>
          <table:table-cell table:formula="of:=LEGACY.FDIST([.$E$8] ; [.$F$20] ; [.$F$8])" office:value-type="float" office:value="2.05904944701061E-038" calcext:value-type="float">
            <text:p>2.05904944701061E-38</text:p>
          </table:table-cell>
          <table:table-cell/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percentage" office:value="1.27" calcext:value-type="percentage">
            <text:p>127.00%</text:p>
          </table:table-cell>
          <table:table-cell table:number-columns-repeated="2"/>
          <table:table-cell office:value-type="string" calcext:value-type="string">
            <text:p>Residual</text:p>
          </table:table-cell>
          <table:table-cell table:formula="of:=[.$F$8]" office:value-type="float" office:value="19" calcext:value-type="float">
            <text:p>19</text:p>
          </table:table-cell>
          <table:table-cell table:formula="of:=[.$F$9]" office:value-type="float" office:value="0.000580767122717825" calcext:value-type="float">
            <text:p>0.000580767122717825</text:p>
          </table:table-cell>
          <table:table-cell table:formula="of:=[.$F$9] / [.$F$8]" office:value-type="float" office:value="0.0000305666906693592" calcext:value-type="float">
            <text:p>3.05666906693592E-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$F$20] + [.$F$8]" office:value-type="float" office:value="20" calcext:value-type="float">
            <text:p>20</text:p>
          </table:table-cell>
          <table:table-cell table:formula="of:=[.$E$9] + [.$F$9]" office:value-type="float" office:value="4.49532380952381" calcext:value-type="float">
            <text:p>4.4953238095238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5:.$F$5]; 1 ; ROW([.$F$28])+1 - ROW())" office:value-type="float" office:value="-9.39536874096728" calcext:value-type="float">
            <text:p>-9.39536874096728</text:p>
          </table:table-cell>
          <table:table-cell table:number-matrix-columns-spanned="1" table:number-matrix-rows-spanned="2" table:formula="of:=INDEX([.$E$6:.$F$6]; 1 ; ROW([.$G$28])+1 - ROW())" office:value-type="float" office:value="0.0261929165443479" calcext:value-type="float">
            <text:p>0.0261929165443479</text:p>
          </table:table-cell>
          <table:table-cell table:number-matrix-columns-spanned="1" table:number-matrix-rows-spanned="2" table:formula="of:=[.$F$27:.$F$28] / [.$G$27:.$G$28]" office:value-type="float" office:value="-358.698838484052" calcext:value-type="float">
            <text:p>-358.698838484052</text:p>
          </table:table-cell>
          <table:table-cell table:number-matrix-columns-spanned="1" table:number-matrix-rows-spanned="2" table:formula="of:=LEGACY.TDIST(ABS([.$H$27:.$H$28]) ; [.$F$8] ; 2 )" office:value-type="float" office:value="7.32084240459821E-038" calcext:value-type="float">
            <text:p>7.32084240459821E-38</text:p>
          </table:table-cell>
          <table:table-cell table:number-matrix-columns-spanned="1" table:number-matrix-rows-spanned="2" table:formula="of:=[.$F$27:.$F$28] - [.$G$27:.$G$28] * TINV(1 - [.$F$24] ; [.$F$8])" office:value-type="float" office:value="-9.45019114534971" calcext:value-type="float">
            <text:p>-9.45019114534971</text:p>
          </table:table-cell>
          <table:table-cell table:number-matrix-columns-spanned="1" table:number-matrix-rows-spanned="2" table:formula="of:=[.$F$27:.$F$28] + [.$G$27:.$G$28] * TINV(1 - [.$F$24] ; [.$F$8])" office:value-type="float" office:value="-9.34054633658485" calcext:value-type="float">
            <text:p>-9.34054633658485</text:p>
          </table:table-cell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799697673279412" calcext:value-type="float">
            <text:p>0.799697673279412</text:p>
          </table:table-cell>
          <table:table-cell office:value-type="float" office:value="0.00208543956639815" calcext:value-type="float">
            <text:p>0.00208543956639815</text:p>
          </table:table-cell>
          <table:table-cell office:value-type="float" office:value="383.467200951119" calcext:value-type="float">
            <text:p>383.467200951119</text:p>
          </table:table-cell>
          <table:table-cell office:value-type="float" office:value="2.05904944701061E-038" calcext:value-type="float">
            <text:p>2.05904944701061E-38</text:p>
          </table:table-cell>
          <table:table-cell office:value-type="float" office:value="0.795332798102926" calcext:value-type="float">
            <text:p>0.795332798102926</text:p>
          </table:table-cell>
          <table:table-cell office:value-type="float" office:value="0.804062548455898" calcext:value-type="float">
            <text:p>0.804062548455898</text:p>
          </table:table-cell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number-matrix-columns-spanned="1" table:number-matrix-rows-spanned="21" table:formula="of:=[.$A$1:.$A$21]" office:value-type="float" office:value="11.829" calcext:value-type="float">
            <text:p>11.829</text:p>
          </table:table-cell>
          <table:table-cell table:number-matrix-columns-spanned="1" table:number-matrix-rows-spanned="21" table:formula="of:=MMULT([.$E$31:.$E$51] ; [.$F$28]) + [.$F$27]" office:value-type="float" office:value="0.0642550362548811" calcext:value-type="float">
            <text:p>0.0642550362548811</text:p>
          </table:table-cell>
          <table:table-cell table:number-matrix-columns-spanned="1" table:number-matrix-rows-spanned="21" table:formula="of:=[.$B$1:.$B$21]" office:value-type="float" office:value="0.06" calcext:value-type="float">
            <text:p>0.06</text:p>
          </table:table-cell>
          <table:table-cell table:number-matrix-columns-spanned="1" table:number-matrix-rows-spanned="21" table:formula="of:=[.$G$31:.$G$51] - [.$F$31:.$F$51]" office:value-type="float" office:value="-0.00425503625488105" calcext:value-type="float">
            <text:p>-0.0042550362548810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.856" calcext:value-type="float">
            <text:p>11.856</text:p>
          </table:table-cell>
          <table:table-cell office:value-type="float" office:value="0.0858468734334252" calcext:value-type="float">
            <text:p>0.0858468734334252</text:p>
          </table:table-cell>
          <table:table-cell office:value-type="float" office:value="0.08" calcext:value-type="float">
            <text:p>0.08</text:p>
          </table:table-cell>
          <table:table-cell office:value-type="float" office:value="-0.00584687343342523" calcext:value-type="float">
            <text:p>-0.00584687343342523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.914" calcext:value-type="float">
            <text:p>11.914</text:p>
          </table:table-cell>
          <table:table-cell office:value-type="float" office:value="0.132229338483631" calcext:value-type="float">
            <text:p>0.13222933848363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7706615163689" calcext:value-type="float">
            <text:p>0.017770661516368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.92" calcext:value-type="float">
            <text:p>11.92</text:p>
          </table:table-cell>
          <table:table-cell office:value-type="float" office:value="0.137027524523308" calcext:value-type="float">
            <text:p>0.137027524523308</text:p>
          </table:table-cell>
          <table:table-cell office:value-type="float" office:value="0.14" calcext:value-type="float">
            <text:p>0.14</text:p>
          </table:table-cell>
          <table:table-cell office:value-type="float" office:value="0.00297247547669188" calcext:value-type="float">
            <text:p>0.0029724754766918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.926" calcext:value-type="float">
            <text:p>11.926</text:p>
          </table:table-cell>
          <table:table-cell office:value-type="float" office:value="0.141825710562985" calcext:value-type="float">
            <text:p>0.14182571056298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82571056298519" calcext:value-type="float">
            <text:p>-0.0018257105629851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.928" calcext:value-type="float">
            <text:p>11.928</text:p>
          </table:table-cell>
          <table:table-cell office:value-type="float" office:value="0.143425105909543" calcext:value-type="float">
            <text:p>0.14342510590954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42510590954304" calcext:value-type="float">
            <text:p>-0.0034251059095430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007" calcext:value-type="float">
            <text:p>12.007</text:p>
          </table:table-cell>
          <table:table-cell office:value-type="float" office:value="0.206601222098616" calcext:value-type="float">
            <text:p>0.206601222098616</text:p>
          </table:table-cell>
          <table:table-cell office:value-type="float" office:value="0.21" calcext:value-type="float">
            <text:p>0.21</text:p>
          </table:table-cell>
          <table:table-cell office:value-type="float" office:value="0.00339877790138401" calcext:value-type="float">
            <text:p>0.0033987779013840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018" calcext:value-type="float">
            <text:p>12.018</text:p>
          </table:table-cell>
          <table:table-cell office:value-type="float" office:value="0.21539789650469" calcext:value-type="float">
            <text:p>0.2153978965046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539789650469033" calcext:value-type="float">
            <text:p>-0.00539789650469033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051" calcext:value-type="float">
            <text:p>12.051</text:p>
          </table:table-cell>
          <table:table-cell office:value-type="float" office:value="0.241787919722912" calcext:value-type="float">
            <text:p>0.241787919722912</text:p>
          </table:table-cell>
          <table:table-cell office:value-type="float" office:value="0.24" calcext:value-type="float">
            <text:p>0.24</text:p>
          </table:table-cell>
          <table:table-cell office:value-type="float" office:value="-0.00178791972291159" calcext:value-type="float">
            <text:p>-0.0017879197229115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509" calcext:value-type="float">
            <text:p>12.509</text:p>
          </table:table-cell>
          <table:table-cell office:value-type="float" office:value="0.608049454084881" calcext:value-type="float">
            <text:p>0.608049454084881</text:p>
          </table:table-cell>
          <table:table-cell office:value-type="float" office:value="0.61" calcext:value-type="float">
            <text:p>0.61</text:p>
          </table:table-cell>
          <table:table-cell office:value-type="float" office:value="0.0019505459151189" calcext:value-type="float">
            <text:p>0.001950545915118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529" calcext:value-type="float">
            <text:p>12.529</text:p>
          </table:table-cell>
          <table:table-cell office:value-type="float" office:value="0.62404340755047" calcext:value-type="float">
            <text:p>0.62404340755047</text:p>
          </table:table-cell>
          <table:table-cell office:value-type="float" office:value="0.62" calcext:value-type="float">
            <text:p>0.62</text:p>
          </table:table-cell>
          <table:table-cell office:value-type="float" office:value="-0.00404340755047017" calcext:value-type="float">
            <text:p>-0.00404340755047017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675" calcext:value-type="float">
            <text:p>12.675</text:p>
          </table:table-cell>
          <table:table-cell office:value-type="float" office:value="0.740799267849264" calcext:value-type="float">
            <text:p>0.740799267849264</text:p>
          </table:table-cell>
          <table:table-cell office:value-type="float" office:value="0.74" calcext:value-type="float">
            <text:p>0.74</text:p>
          </table:table-cell>
          <table:table-cell office:value-type="float" office:value="-0.000799267849263652" calcext:value-type="float">
            <text:p>-0.00079926784926365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795" calcext:value-type="float">
            <text:p>12.795</text:p>
          </table:table-cell>
          <table:table-cell office:value-type="float" office:value="0.836762988642793" calcext:value-type="float">
            <text:p>0.836762988642793</text:p>
          </table:table-cell>
          <table:table-cell office:value-type="float" office:value="0.84" calcext:value-type="float">
            <text:p>0.84</text:p>
          </table:table-cell>
          <table:table-cell office:value-type="float" office:value="0.00323701135720722" calcext:value-type="float">
            <text:p>0.0032370113572072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818" calcext:value-type="float">
            <text:p>12.818</text:p>
          </table:table-cell>
          <table:table-cell office:value-type="float" office:value="0.85515603512822" calcext:value-type="float">
            <text:p>0.85515603512822</text:p>
          </table:table-cell>
          <table:table-cell office:value-type="float" office:value="0.85" calcext:value-type="float">
            <text:p>0.85</text:p>
          </table:table-cell>
          <table:table-cell office:value-type="float" office:value="-0.00515603512821949" calcext:value-type="float">
            <text:p>-0.0051560351282194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2.982" calcext:value-type="float">
            <text:p>12.982</text:p>
          </table:table-cell>
          <table:table-cell office:value-type="float" office:value="0.986306453546042" calcext:value-type="float">
            <text:p>0.986306453546042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9354645395759" calcext:value-type="float">
            <text:p>0.0036935464539575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141" calcext:value-type="float">
            <text:p>13.141</text:p>
          </table:table-cell>
          <table:table-cell office:value-type="float" office:value="1.11345838359747" calcext:value-type="float">
            <text:p>1.11345838359747</text:p>
          </table:table-cell>
          <table:table-cell office:value-type="float" office:value="1.11" calcext:value-type="float">
            <text:p>1.11</text:p>
          </table:table-cell>
          <table:table-cell office:value-type="float" office:value="-0.00345838359746975" calcext:value-type="float">
            <text:p>-0.0034583835974697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269" calcext:value-type="float">
            <text:p>13.269</text:p>
          </table:table-cell>
          <table:table-cell office:value-type="float" office:value="1.21581968577723" calcext:value-type="float">
            <text:p>1.21581968577723</text:p>
          </table:table-cell>
          <table:table-cell office:value-type="float" office:value="1.22" calcext:value-type="float">
            <text:p>1.22</text:p>
          </table:table-cell>
          <table:table-cell office:value-type="float" office:value="0.0041803142227661" calcext:value-type="float">
            <text:p>0.004180314222766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308" calcext:value-type="float">
            <text:p>13.308</text:p>
          </table:table-cell>
          <table:table-cell office:value-type="float" office:value="1.24700789503513" calcext:value-type="float">
            <text:p>1.24700789503513</text:p>
          </table:table-cell>
          <table:table-cell office:value-type="float" office:value="1.25" calcext:value-type="float">
            <text:p>1.25</text:p>
          </table:table-cell>
          <table:table-cell office:value-type="float" office:value="0.00299210496486779" calcext:value-type="float">
            <text:p>0.0029921049648677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331" calcext:value-type="float">
            <text:p>13.331</text:p>
          </table:table-cell>
          <table:table-cell office:value-type="float" office:value="1.26540094152056" calcext:value-type="float">
            <text:p>1.26540094152056</text:p>
          </table:table-cell>
          <table:table-cell office:value-type="float" office:value="1.26" calcext:value-type="float">
            <text:p>1.26</text:p>
          </table:table-cell>
          <table:table-cell office:value-type="float" office:value="-0.00540094152055715" calcext:value-type="float">
            <text:p>-0.0054009415205571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334" calcext:value-type="float">
            <text:p>13.334</text:p>
          </table:table-cell>
          <table:table-cell office:value-type="float" office:value="1.2678000345404" calcext:value-type="float">
            <text:p>1.2678000345404</text:p>
          </table:table-cell>
          <table:table-cell office:value-type="float" office:value="1.27" calcext:value-type="float">
            <text:p>1.27</text:p>
          </table:table-cell>
          <table:table-cell office:value-type="float" office:value="0.00219996545960344" calcext:value-type="float">
            <text:p>0.0021999654596034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3.338" calcext:value-type="float">
            <text:p>13.338</text:p>
          </table:table-cell>
          <table:table-cell office:value-type="float" office:value="1.27099882523351" calcext:value-type="float">
            <text:p>1.27099882523351</text:p>
          </table:table-cell>
          <table:table-cell office:value-type="float" office:value="1.27" calcext:value-type="float">
            <text:p>1.27</text:p>
          </table:table-cell>
          <table:table-cell office:value-type="float" office:value="-0.000998825233514022" calcext:value-type="float">
            <text:p>-0.00099882523351402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28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1_2.A1:Sheet1_2.A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1:18:17.759484100</meta:creation-date>
    <dc:date>2026-03-04T21:27:04.813990100</dc:date>
    <meta:editing-duration>PT8M46S</meta:editing-duration>
    <meta:editing-cycles>3</meta:editing-cycles>
    <meta:generator>LibreOffice/25.2.7.2$Windows_X86_64 LibreOffice_project/5cbfd1ab6520636bb5f7b99185aa69bd7456825d</meta:generator>
    <meta:document-statistic meta:table-count="2" meta:cell-count="434" meta:object-count="0"/>
  </office:meta>
</office:document-meta>
</file>